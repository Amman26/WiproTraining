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login_data" table:style-name="ta1">
        <table:table-row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expected_result</text:p>
          </table:table-cell>
        </table:table-row>
        <table:table-row>
          <table:table-cell office:value-type="string">
            <text:p>standard_user</text:p>
          </table:table-cell>
          <table:table-cell office:value-type="string">
            <text:p>secret_sauce</text:p>
          </table:table-cell>
          <table:table-cell office:value-type="string">
            <text:p>success</text:p>
          </table:table-cell>
        </table:table-row>
        <table:table-row>
          <table:table-cell office:value-type="string">
            <text:p>locked_out_user</text:p>
          </table:table-cell>
          <table:table-cell office:value-type="string">
            <text:p>secret_sauce</text:p>
          </table:table-cell>
          <table:table-cell office:value-type="string">
            <text:p>failure</text:p>
          </table:table-cell>
        </table:table-row>
        <table:table-row>
          <table:table-cell office:value-type="string">
            <text:p>wrong_user</text:p>
          </table:table-cell>
          <table:table-cell office:value-type="string">
            <text:p>wrong_pass</text:p>
          </table:table-cell>
          <table:table-cell office:value-type="string">
            <text:p>failure</text:p>
          </table:table-cell>
        </table:table-row>
      </table:table>
      <table:table table:name="product_validation_data" table:style-name="ta1">
        <table:table-row>
          <table:table-cell office:value-type="string">
            <text:p>product_name</text:p>
          </table:table-cell>
        </table:table-row>
        <table:table-row>
          <table:table-cell office:value-type="string">
            <text:p>Sauce Labs Backpack</text:p>
          </table:table-cell>
        </table:table-row>
        <table:table-row>
          <table:table-cell office:value-type="string">
            <text:p>Sauce Labs Bike Ligh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7.5</meta:generator>
  </office:meta>
</office:document-meta>
</file>